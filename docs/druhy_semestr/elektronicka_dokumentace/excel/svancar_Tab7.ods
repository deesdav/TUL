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7486111111111cm"/>
    </style:style>
    <style:style style:name="co2" style:family="table-column">
      <style:table-column-properties fo:break-before="auto" style:column-width="5.36222222222222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český jazyk a literatura&quot;;&quot;anglický jazyk&quot;;&quot;zeměpis&quot;;&quot;matematika&quot;;&quot;dějepis&quot;)">
          <table:help-message table:display="true"/>
          <table:error-message table:display="true"/>
        </table:content-validation>
        <table:content-validation table:name="val2" table:condition="of:cell-content-is-in-list(&quot;1&quot;;&quot;2&quot;;&quot;3&quot;;&quot;4&quot;;&quot;5&quot;)">
          <table:help-message table:display="true"/>
          <table:error-message table:display="true"/>
        </table:content-validation>
      </table:content-validations>
      <table:table table:name="známk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jméno</text:p>
          </table:table-cell>
          <table:table-cell office:value-type="string" table:style-name="ce1">
            <text:p>předmět</text:p>
          </table:table-cell>
          <table:table-cell office:value-type="string" table:style-name="ce1">
            <text:p>znám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anglický jazyk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zeměpis</text:p>
          </table:table-cell>
          <table:table-cell office:value-type="float" office:value="4" table:content-validation-name="val2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matematik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matematika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dějepis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zeměpis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 Sokol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zeměpis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matematik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matematik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dějepis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2" table:content-validation-name="val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anglický jazyk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český jazyk a literatura</text:p>
          </table:table-cell>
          <table:table-cell office:value-type="float" office:value="3" table:content-validation-name="val2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 Matěj</text:p>
          </table:table-cell>
          <table:table-cell office:value-type="string" table:content-validation-name="val1" table:style-name="ce1">
            <text:p>zeměpis</text:p>
          </table:table-cell>
          <table:table-cell office:value-type="float" office:value="1" table:content-validation-name="val2" table:style-name="ce1">
            <text:p>1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E" svg:font-family="&quot;Arial CE&quot;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odnota_32_pr_367_vodce_32_daty" style:display-name="Hodnota průvodce daty" style:family="table-cell" style:data-style-name="N0">
      <style:table-cell-properties style:vertical-align="automatic" fo:background-color="transparent"/>
    </style:style>
    <style:style style:name="Kategorie_32_pr_367_vodce_32_daty" style:display-name="Kategorie průvodce dat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Nadpis_32_pr_367_vodce_32_daty" style:display-name="Nadpis průvodce daty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1pt" style:font-size-asian="11pt" style:font-size-complex="11pt"/>
    </style:style>
    <style:style style:name="Polo_382_ka_32_pr_367_vodce_32_daty" style:display-name="Položka průvodce daty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h_32_pr_367_vodce_32_daty" style:display-name="Roh průvodce daty" style:family="table-cell" style:data-style-name="N0">
      <style:table-cell-properties style:vertical-align="automatic" fo:background-color="transparent"/>
    </style:style>
    <style:style style:name="V_253_sledek_32_pr_367_vodce_32_daty" style:display-name="Výsledek průvodce daty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title>Prvni priklad v Excelu</dc:title>
    <meta:initial-creator>Jindra Drábková</meta:initial-creator>
    <dc:creator>David Švancar</dc:creator>
    <meta:creation-date>2000-12-21T16:29:01Z</meta:creation-date>
    <dc:date>2026-05-06T14:40:49Z</dc:date>
    <meta:print-date>2006-12-13T13:01:48Z</meta:print-date>
    <meta:editing-cycles>6</meta:editing-cycles>
    <meta:editing-duration>PT7374S</meta:editing-duration>
    <meta:user-defined meta:name="Info 1"/>
    <meta:user-defined meta:name="Info 2"/>
    <meta:user-defined meta:name="Info 3"/>
    <meta:user-defined meta:name="Info 4"/>
  </office:meta>
</office:document-meta>
</file>