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2.73402777777778cm"/>
    </style:style>
    <style:style style:name="co4" style:family="table-column">
      <style:table-column-properties fo:break-before="auto" style:column-width="4.42736111111111cm"/>
    </style:style>
    <style:style style:name="co5" style:family="table-column">
      <style:table-column-properties fo:break-before="auto" style:column-width="6.82625cm"/>
    </style:style>
    <style:style style:name="co6" style:family="table-column">
      <style:table-column-properties fo:break-before="auto" style:column-width="8.13152777777778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55222222222222cm"/>
    </style:style>
    <style:style style:name="co10" style:family="table-column">
      <style:table-column-properties fo:break-before="auto" style:column-width="2.31069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ecimal-number() and cell-content-is-between(20,300)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.5,2.5)">
          <table:help-message table:display="true"/>
          <table:error-message table:display="true"/>
        </table:content-validation>
      </table:content-validations>
      <table:table table:name="BM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 table:visibility="collapse"/>
        <table:table-column table:style-name="co9" table:default-cell-style-name="ce1" table:visibility="collapse"/>
        <table:table-column table:style-name="co10" table:default-cell-style-name="ce1" table:visibility="collapse"/>
        <table:table-column table:style-name="co1" table:number-columns-repeated="16374" table:default-cell-style-name="ce1"/>
        <table:table-row table:style-name="ro1">
          <table:table-cell office:value-type="string" table:style-name="ce1">
            <text:p>jméno</text:p>
          </table:table-cell>
          <table:table-cell office:value-type="string" table:style-name="ce1">
            <text:p>váha [kg]</text:p>
          </table:table-cell>
          <table:table-cell office:value-type="string" table:style-name="ce1">
            <text:p>výška [m]</text:p>
          </table:table-cell>
          <table:table-cell office:value-type="string" table:style-name="ce1">
            <text:p>BMI</text:p>
          </table:table-cell>
          <table:table-cell office:value-type="string" table:style-name="ce1">
            <text:p>Vypočtená Kategorie</text:p>
          </table:table-cell>
          <table:table-cell office:value-type="string" table:style-name="ce1">
            <text:p>Vypočtená Zdravotní rizik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odváha</text:p>
          </table:table-cell>
          <table:table-cell office:value-type="string" table:style-name="ce1">
            <text:p>Zvýšené (riziko podvýživy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vžen</text:p>
          </table:table-cell>
          <table:table-cell office:value-type="float" office:value="95" table:content-validation-name="val1" table:style-name="ce1">
            <text:p>95</text:p>
          </table:table-cell>
          <table:table-cell office:value-type="float" office:value="1.75" table:content-validation-name="val2" table:style-name="ce1">
            <text:p>1,75</text:p>
          </table:table-cell>
          <table:table-cell office:value-type="float" office:value="31.020408163265305" table:formula="of:=[.B2]/([.C2]^2)" table:style-name="ce1">
            <text:p>31,02040816</text:p>
          </table:table-cell>
          <table:table-cell office:value-type="string" office:string-value="Obezita 1. stupně" table:formula="of:=VLOOKUP([.D2]; [.$H$1:.$J$6]; 2; TRUE)" table:style-name="ce1">
            <text:p>Obezita 1. stupně</text:p>
          </table:table-cell>
          <table:table-cell office:value-type="string" office:string-value="Zvýšené" table:formula="of:=VLOOKUP([.D2]; [.$H$1:.$J$6]; 3; TRUE)" table:style-name="ce1">
            <text:p>Zvýšené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office:value-type="string" table:style-name="ce1">
            <text:p>Normální váha</text:p>
          </table:table-cell>
          <table:table-cell office:value-type="string" table:style-name="ce1">
            <text:p>Minimální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vatava</text:p>
          </table:table-cell>
          <table:table-cell office:value-type="float" office:value="68" table:content-validation-name="val1" table:style-name="ce1">
            <text:p>68</text:p>
          </table:table-cell>
          <table:table-cell office:value-type="float" office:value="1.64" table:content-validation-name="val2" table:style-name="ce1">
            <text:p>1,64</text:p>
          </table:table-cell>
          <table:table-cell office:value-type="float" office:value="25.282569898869724" table:formula="of:=[.B3]/([.C3]^2)" table:style-name="ce1">
            <text:p>25,2825699</text:p>
          </table:table-cell>
          <table:table-cell office:value-type="string" office:string-value="Nadváha" table:formula="of:=VLOOKUP([.D3]; [.$H$1:.$J$6]; 2; TRUE)" table:style-name="ce1">
            <text:p>Nadváha</text:p>
          </table:table-cell>
          <table:table-cell office:value-type="string" office:string-value="Nízké až lehce zvýšené" table:formula="of:=VLOOKUP([.D3]; [.$H$1:.$J$6]; 3; TRUE)" table:style-name="ce1">
            <text:p>Nízké až lehce zvýšené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adváha</text:p>
          </table:table-cell>
          <table:table-cell office:value-type="string" table:style-name="ce1">
            <text:p>Nízké až lehce zvýšené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olana</text:p>
          </table:table-cell>
          <table:table-cell office:value-type="float" office:value="50" table:content-validation-name="val1" table:style-name="ce1">
            <text:p>50</text:p>
          </table:table-cell>
          <table:table-cell office:value-type="float" office:value="1.85" table:content-validation-name="val2" table:style-name="ce1">
            <text:p>1,85</text:p>
          </table:table-cell>
          <table:table-cell office:value-type="float" office:value="14.609203798392986" table:formula="of:=[.B4]/([.C4]^2)" table:style-name="ce1">
            <text:p>14,6092038</text:p>
          </table:table-cell>
          <table:table-cell office:value-type="string" office:string-value="Podváha" table:formula="of:=VLOOKUP([.D4]; [.$H$1:.$J$6]; 2; TRUE)" table:style-name="ce1">
            <text:p>Podváha</text:p>
          </table:table-cell>
          <table:table-cell office:value-type="string" office:string-value="Zvýšené (riziko podvýživy)" table:formula="of:=VLOOKUP([.D4]; [.$H$1:.$J$6]; 3; TRUE)" table:style-name="ce1">
            <text:p>Zvýšené (riziko podvýživy)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Obezita 1. stupně</text:p>
          </table:table-cell>
          <table:table-cell office:value-type="string" table:style-name="ce1">
            <text:p>Zvýšené</text:p>
          </table:table-cell>
          <table:table-cell table:number-columns-repeated="16374"/>
        </table:table-row>
        <table:table-row table:style-name="ro1">
          <table:table-cell table:style-name="ce1"/>
          <table:table-cell table:content-validation-name="val1" table:style-name="ce1"/>
          <table:table-cell table:content-validation-name="val2" table:style-name="ce1"/>
          <table:table-cell table:number-columns-repeated="4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Obezita 2. stupně</text:p>
          </table:table-cell>
          <table:table-cell office:value-type="string" table:style-name="ce1">
            <text:p>Vysoké</text:p>
          </table:table-cell>
          <table:table-cell table:number-columns-repeated="16374"/>
        </table:table-row>
        <table:table-row table:style-name="ro1">
          <table:table-cell table:style-name="ce1"/>
          <table:table-cell table:content-validation-name="val1" table:style-name="ce1"/>
          <table:table-cell table:content-validation-name="val2" table:style-name="ce1"/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Obezita 3. stupně</text:p>
          </table:table-cell>
          <table:table-cell office:value-type="string" table:style-name="ce1">
            <text:p>Velmi vysoké</text:p>
          </table:table-cell>
          <table:table-cell table:number-columns-repeated="16374"/>
        </table:table-row>
        <table:table-row table:number-rows-repeated="18" table:style-name="ro1">
          <table:table-cell/>
          <table:table-cell table:content-validation-name="val1" table:style-name="ce1"/>
          <table:table-cell table:content-validation-name="val2" table:style-name="ce1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Jindra Drábková</meta:initial-creator>
    <dc:creator>David Švancar</dc:creator>
    <meta:creation-date>2008-03-03T21:28:01Z</meta:creation-date>
    <dc:date>2026-05-06T14:59:45Z</dc:date>
    <meta:editing-cycles>2</meta:editing-cycles>
    <meta:editing-duration>PT284S</meta:editing-duration>
  </office:meta>
</office:document-meta>
</file>